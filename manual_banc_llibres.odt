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a1" style:family="table">
      <style:table-properties style:width="16.302cm" table:align="left"/>
    </style:style>
    <style:style style:name="Tabla1.A" style:family="table-column">
      <style:table-column-properties style:column-width="4.235cm"/>
    </style:style>
    <style:style style:name="Tabla1.B" style:family="table-column">
      <style:table-column-properties style:column-width="12.06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383cm" table:align="left"/>
    </style:style>
    <style:style style:name="Tabla2.A" style:family="table-column">
      <style:table-column-properties style:column-width="2.806cm"/>
    </style:style>
    <style:style style:name="Tabla2.B" style:family="table-column">
      <style:table-column-properties style:column-width="9.633cm"/>
    </style:style>
    <style:style style:name="Tabla2.C" style:family="table-column">
      <style:table-column-properties style:column-width="3.94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 fo:orphans="100"/>
      <style:text-properties fo:color="#ffffff" loext:opacity="100%" fo:background-color="#1a237e" loext:padding="0cm" loext:border="none"/>
    </style:style>
    <style:style style:name="P2" style:family="paragraph" style:parent-style-name="Heading_20_2">
      <style:text-properties loext:padding="0cm" loext:border="none"/>
    </style:style>
    <style:style style:name="P3" style:family="paragraph" style:parent-style-name="Text_20_body" style:master-page-name="HTML">
      <style:paragraph-properties fo:text-align="center" style:justify-single-word="false" fo:orphans="100" style:page-number="auto"/>
      <style:text-properties fo:color="#ffffff" loext:opacity="100%" fo:background-color="#1a237e" loext:padding="0cm" loext:border="non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fo:orphans="100"/>
      <style:text-properties fo:color="#ffffff" loext:opacity="100%" fo:background-color="#1a237e" loext:padding="0cm" loext:border="none"/>
    </style:style>
    <style:style style:name="P5" style:family="paragraph" style:parent-style-name="Text_20_body">
      <style:paragraph-properties fo:text-align="center" style:justify-single-word="false" fo:orphans="100"/>
      <style:text-properties fo:color="#ffffff" loext:opacity="100%" fo:background-color="#1a237e"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 style:list-style-name="L1">
      <style:text-properties loext:padding="0cm" loext:border="none"/>
    </style:style>
    <style:style style:name="P8" style:family="paragraph" style:parent-style-name="Text_20_body">
      <style:text-properties loext:padding="0cm" loext:border="none"/>
    </style:style>
    <style:style style:name="P9" style:family="paragraph" style:parent-style-name="Text_20_body" style:list-style-name="L3">
      <style:text-properties loext:padding="0cm" loext:border="none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loext:padding="0cm" loext:border="none"/>
    </style:style>
    <style:style style:name="P11" style:family="paragraph" style:parent-style-name="Text_20_body" style:list-style-name="L4">
      <style:text-properties loext:padding="0cm" loext:border="none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loext:padding="0cm" loext:border="none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loext:padding="0cm" loext:border="none"/>
    </style:style>
    <style:style style:name="P14" style:family="paragraph" style:parent-style-name="Text_20_body" style:list-style-name="L7">
      <style:text-properties loext:padding="0cm" loext:border="none"/>
    </style:style>
    <style:style style:name="P15" style:family="paragraph" style:parent-style-name="Text_20_body" style:list-style-name="L8">
      <style:paragraph-properties fo:margin-top="0cm" fo:margin-bottom="0cm" style:contextual-spacing="false"/>
      <style:text-properties loext:padding="0cm" loext:border="none"/>
    </style:style>
    <style:style style:name="P16" style:family="paragraph" style:parent-style-name="Text_20_body" style:list-style-name="L8">
      <style:text-properties loext:padding="0cm" loext:border="none"/>
    </style:style>
    <style:style style:name="P17" style:family="paragraph" style:parent-style-name="Text_20_body" style:list-style-name="L9">
      <style:paragraph-properties fo:margin-top="0cm" fo:margin-bottom="0cm" style:contextual-spacing="false"/>
      <style:text-properties loext:padding="0cm" loext:border="none"/>
    </style:style>
    <style:style style:name="P18" style:family="paragraph" style:parent-style-name="Text_20_body" style:list-style-name="L9">
      <style:text-properties loext:padding="0cm" loext:border="none"/>
    </style:style>
    <style:style style:name="P19" style:family="paragraph" style:parent-style-name="Text_20_body" style:list-style-name="L10">
      <style:paragraph-properties fo:margin-top="0cm" fo:margin-bottom="0cm" style:contextual-spacing="false"/>
      <style:text-properties loext:padding="0cm" loext:border="none"/>
    </style:style>
    <style:style style:name="P20" style:family="paragraph" style:parent-style-name="Text_20_body" style:list-style-name="L10">
      <style:text-properties loext:padding="0cm" loext:border="none"/>
    </style:style>
    <style:style style:name="P21" style:family="paragraph" style:parent-style-name="Text_20_body" style:list-style-name="L11">
      <style:paragraph-properties fo:margin-top="0cm" fo:margin-bottom="0cm" style:contextual-spacing="false"/>
      <style:text-properties loext:padding="0cm" loext:border="none"/>
    </style:style>
    <style:style style:name="P22" style:family="paragraph" style:parent-style-name="Text_20_body" style:list-style-name="L11">
      <style:text-properties loext:padding="0cm" loext:border="none"/>
    </style:style>
    <style:style style:name="P23" style:family="paragraph" style:parent-style-name="Text_20_body" style:list-style-name="L12">
      <style:paragraph-properties fo:margin-top="0cm" fo:margin-bottom="0cm" style:contextual-spacing="false"/>
      <style:text-properties loext:padding="0cm" loext:border="none"/>
    </style:style>
    <style:style style:name="P24" style:family="paragraph" style:parent-style-name="Text_20_body" style:list-style-name="L13">
      <style:paragraph-properties fo:margin-top="0cm" fo:margin-bottom="0cm" style:contextual-spacing="false"/>
      <style:text-properties loext:padding="0cm" loext:border="none"/>
    </style:style>
    <style:style style:name="P25" style:family="paragraph" style:parent-style-name="Text_20_body" style:list-style-name="L13">
      <style:text-properties loext:padding="0cm" loext:border="none"/>
    </style:style>
    <style:style style:name="P26" style:family="paragraph" style:parent-style-name="Text_20_body">
      <style:paragraph-properties fo:margin-left="0.318cm" fo:margin-right="0.318cm" fo:margin-top="0.318cm" fo:margin-bottom="0.318cm" style:contextual-spacing="false" fo:text-indent="0cm" style:auto-text-indent="false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 style:parent-style-name="Text_20_body" style:list-style-name="L4">
      <style:paragraph-properties fo:margin-top="0cm" fo:margin-bottom="0cm" style:contextual-spacing="false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9">
      <style:paragraph-properties fo:margin-top="0cm" fo:margin-bottom="0cm" style:contextual-spacing="false"/>
    </style:style>
    <style:style style:name="P35" style:family="paragraph" style:parent-style-name="Text_20_body" style:list-style-name="L10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4"/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 style:list-style-name="L15"/>
    <style:style style:name="P40" style:family="paragraph" style:parent-style-name="Text_20_body" style:list-style-name="L15">
      <style:paragraph-properties fo:margin-top="0cm" fo:margin-bottom="0cm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cm" fo:margin-bottom="0cm" style:contextual-spacing="false"/>
    </style:style>
    <style:style style:name="P43" style:family="paragraph" style:parent-style-name="Título_20_2.seccio">
      <style:text-properties loext:padding="0cm" loext:border="none"/>
    </style:style>
    <style:style style:name="P44" style:family="paragraph" style:parent-style-name="Título_20_3.subseccio">
      <style:text-properties loext:padding="0cm" loext:border="none"/>
    </style:style>
    <style:style style:name="T1" style:family="text">
      <style:text-properties fo:color="#283593" loext:opacity="100%" style:font-name="monospace" fo:font-size="10pt" fo:background-color="#e8eaf6" loext:char-shading-value="0" loext:padding="0cm" loext:border="none"/>
    </style:style>
    <style:style style:name="T2" style:family="text">
      <style:text-properties fo:font-size="10.5pt" fo:background-color="#e3f2fd" loext:char-shading-value="0" loext:padding-left="0.37cm" loext:padding-right="0cm" loext:padding-top="0cm" loext:padding-bottom="0cm" loext:border-left="3.74pt solid #1565c0" loext:border-right="none" loext:border-top="none" loext:border-bottom="none"/>
    </style:style>
    <style:style style:name="T3" style:family="text">
      <style:text-properties fo:font-size="10.5pt" fo:background-color="#fff8e1" loext:char-shading-value="0" loext:padding-left="0.37cm" loext:padding-right="0cm" loext:padding-top="0cm" loext:padding-bottom="0cm" loext:border-left="3.74pt solid #f57f17" loext:border-right="none" loext:border-top="none" loext:border-bottom="none"/>
    </style:style>
    <style:style style:name="T4" style:family="text">
      <style:text-properties fo:font-size="10.5pt" fo:background-color="#e8f5e9" loext:char-shading-value="0" loext:padding-left="0.37cm" loext:padding-right="0cm" loext:padding-top="0cm" loext:padding-bottom="0cm" loext:border-left="3.74pt solid #2e7d32" loext:border-right="none" loext:border-top="none" loext:border-bottom="none"/>
    </style:style>
    <style:style style:name="T5" style:family="text">
      <style:text-properties fo:background-color="#e3f2fd" loext:char-shading-value="0" loext:padding-left="0.37cm" loext:padding-right="0cm" loext:padding-top="0cm" loext:padding-bottom="0cm" loext:border-left="3.74pt solid #1565c0" loext:border-right="none" loext:border-top="none" loext:border-bottom="none"/>
    </style:style>
    <style:style style:name="T6" style:family="text">
      <style:text-properties loext:padding="0cm" loext:border="none"/>
    </style:style>
    <style:style style:name="T7" style:family="text">
      <style:text-properties fo:color="#ffffff" loext:opacity="100%" fo:font-size="10pt" fo:font-weight="bold" fo:background-color="#1a237e" loext:char-shading-value="0"/>
    </style:style>
    <style:style style:name="T8" style:family="text">
      <style:text-properties fo:color="#ffffff" loext:opacity="100%" fo:font-size="10pt" fo:font-weight="bold" fo:background-color="#1a237e" loext:char-shading-value="0" loext:padding="0cm" loext:border="none"/>
    </style:style>
    <style:style style:name="T9" style:family="text">
      <style:text-properties fo:background-color="#fff8e1" loext:char-shading-value="0" loext:padding-left="0.37cm" loext:padding-right="0cm" loext:padding-top="0cm" loext:padding-bottom="0cm" loext:border-left="3.74pt solid #f57f17" loext:border-right="none" loext:border-top="none" loext:border-bottom="none"/>
    </style:style>
    <style:style style:name="T10" style:family="text">
      <style:text-properties fo:background-color="#e8f5e9" loext:char-shading-value="0" loext:padding-left="0.37cm" loext:padding-right="0cm" loext:padding-top="0cm" loext:padding-bottom="0cm" loext:border-left="3.74pt solid #2e7d32" loext:border-right="none" loext:border-top="none" loext:border-bottom="none"/>
    </style:style>
    <style:style style:name="T1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📚</text:p>
      <text:p text:style-name="P1">Banc de Llibres</text:p>
      <text:p text:style-name="P4">Manual d'usuari per al professorat</text:p>
      <text:p text:style-name="P4">Curs 2025/2026</text:p>
      <text:p text:style-name="P5">Aquest manual explica pas a pas com utilitzar l'aplicació de gestió del banc de llibres.<text:line-break/><text:line-break/>Pensat per a tot el professorat, sense necessitat de coneixements tècnics. </text:p>
      <text:h text:style-name="P2" text:outline-level="2">Índex</text:h>
      <text:list xml:id="list1240929997" text:style-name="L1">
        <text:list-item>
          <text:p text:style-name="P6">Accés a l'aplicació </text:p>
        </text:list-item>
        <text:list-item>
          <text:p text:style-name="P6">Pàgina principal — Inici </text:p>
        </text:list-item>
        <text:list-item>
          <text:p text:style-name="P6">Navegació: la barra lateral </text:p>
        </text:list-item>
        <text:list-item>
          <text:p text:style-name="P6">Classes i alumnes </text:p>
          <text:list>
            <text:list-item>
              <text:p text:style-name="P6">Veure la llista d'alumnes per classe </text:p>
            </text:list-item>
            <text:list-item>
              <text:p text:style-name="P6">Fitxa d'alumne </text:p>
            </text:list-item>
          </text:list>
        </text:list-item>
        <text:list-item>
          <text:p text:style-name="P6">Préstecs </text:p>
          <text:list>
            <text:list-item>
              <text:p text:style-name="P6">Assignar un lot de llibres </text:p>
            </text:list-item>
            <text:list-item>
              <text:p text:style-name="P6">Afegir un llibre d'optativa </text:p>
            </text:list-item>
            <text:list-item>
              <text:p text:style-name="P6">Registrar una devolució </text:p>
            </text:list-item>
            <text:list-item>
              <text:p text:style-name="P6">Registrar una incidència </text:p>
            </text:list-item>
            <text:list-item>
              <text:p text:style-name="P6">Historial d'un alumne </text:p>
            </text:list-item>
          </text:list>
        </text:list-item>
        <text:list-item>
          <text:p text:style-name="P6">Incidències — veure i marcar com a pagades </text:p>
        </text:list-item>
        <text:list-item>
          <text:p text:style-name="P6">Inventari: matèries, llibres i exemplars </text:p>
        </text:list-item>
        <text:list-item>
          <text:p text:style-name="P6">Administració (només per a l'administrador) </text:p>
        </text:list-item>
        <text:list-item>
          <text:p text:style-name="P7">Preguntes freqüents </text:p>
        </text:list-item>
      </text:list>
      <text:h text:style-name="P43" text:outline-level="2">1. Accés a l'aplicació</text:h>
      <text:p text:style-name="P8">Obriu el navegador web (Chrome, Firefox, Edge…) i aneu a l'adreça de l'aplicació que us haurà indicat el responsable informàtic del centre.</text:p>
      <text:p text:style-name="P26"><text:span text:style-name="Strong_20_Emphasis"><text:span text:style-name="T5">💡 </text:span></text:span><text:span text:style-name="Strong_20_Emphasis"><text:span text:style-name="T2">Adreça habitual:</text:span></text:span><text:span text:style-name="T2"> </text:span><text:span text:style-name="T1">http://localhost/BancLLibres</text:span><text:span text:style-name="T2"> (si sou al mateix ordinador on s'executa el servidor).</text:span></text:p>
      <text:p text:style-name="P8">Veureu la pantalla d'inici de sessió:</text:p>
      <text:list xml:id="list3224391310" text:style-name="L2">
        <text:list-item>
          <text:p text:style-name="P28"><text:span text:style-name="Strong_20_Emphasis"><text:span text:style-name="T6">Correu electrònic:</text:span></text:span><text:span text:style-name="T6"> el vostre correu de centre (p.ex. </text:span><text:span text:style-name="Emphasis"><text:span text:style-name="T6">anna.garcia@institut.es</text:span></text:span><text:span text:style-name="T6">) </text:span></text:p>
        </text:list-item>
        <text:list-item>
          <text:p text:style-name="P27"><text:span text:style-name="Strong_20_Emphasis"><text:span text:style-name="T6">Contrasenya:</text:span></text:span><text:span text:style-name="T6"> la que us ha facilitat el coordinador </text:span></text:p>
        </text:list-item>
      </text:list>
      <text:list xml:id="list549639040" text:style-name="L3">
        <text:list-item>
          <text:p text:style-name="P9">Feu clic a <text:span text:style-name="T7">Iniciar sessió</text:span> </text:p>
        </text:list-item>
      </text:list>
      <text:p text:style-name="P26"><text:span text:style-name="Strong_20_Emphasis"><text:span text:style-name="T9">⚠️ </text:span></text:span><text:span text:style-name="Strong_20_Emphasis"><text:span text:style-name="T3">Si no podeu entrar:</text:span></text:span><text:span text:style-name="T3"> contacteu amb l'administrador de l'aplicació per restablir la contrasenya. No intenteu entrar amb les credencials d'un altre professor/a.</text:span></text:p>
      <text:h text:style-name="P44" text:outline-level="3">Tancar la sessió</text:h>
      <text:p text:style-name="Text_20_body"><text:span text:style-name="T6">Per sortir de l'aplicació, feu clic al vostre nom a la part inferior de la barra lateral esquerra i després a </text:span><text:span text:style-name="Strong_20_Emphasis"><text:span text:style-name="T6">«Tancar sessió»</text:span></text:span><text:span text:style-name="T6">. Sempre que deixeu l'ordinador sense vigilància, tanqueu la sessió.</text:span></text:p>
      <text:h text:style-name="P2" text:outline-level="2">2. Pàgina principal — Inici</text:h>
      <text:p text:style-name="Text_20_body"><text:span text:style-name="T6">En entrar a l'aplicació veureu el </text:span><text:span text:style-name="Strong_20_Emphasis"><text:span text:style-name="T6">tauler de resum</text:span></text:span><text:span text:style-name="T6"> (dashboard). Mostra d'un cop d'ull l'estat general del banc de llibres.</text:span></text:p>
      <text:h text:style-name="P44" text:outline-level="3">Targetes de resum</text:h>
      <text:p text:style-name="P8">Hi ha sis targetes de colors, cadascuna amb un comptador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Heading">Targeta</text:p>
          </table:table-cell>
          <table:table-cell table:style-name="Tabla1.A1" office:value-type="string">
            <text:p text:style-name="Table_20_Heading">Què vol dir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xemplars totals</text:span></text:p>
          </table:table-cell>
          <table:table-cell table:style-name="Tabla1.A1" office:value-type="string">
            <text:p text:style-name="Table_20_Contents">Tots els llibres físics que existeixen al banc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n préstec ara</text:span></text:p>
          </table:table-cell>
          <table:table-cell table:style-name="Tabla1.A1" office:value-type="string">
            <text:p text:style-name="Table_20_Contents">Llibres que en aquest moment estan en mans d'algun alumne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erduts</text:span></text:p>
          </table:table-cell>
          <table:table-cell table:style-name="Tabla1.A1" office:value-type="string">
            <text:p text:style-name="Table_20_Contents">Llibres marcats com a perdut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cidències totals</text:span></text:p>
          </table:table-cell>
          <table:table-cell table:style-name="Tabla1.A1" office:value-type="string">
            <text:p text:style-name="Table_20_Contents">Totes les incidències registrades (pèrdues, deterioraments…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endent de pagament</text:span></text:p>
          </table:table-cell>
          <table:table-cell table:style-name="Tabla1.A1" office:value-type="string">
            <text:p text:style-name="Table_20_Contents">Incidències en què l'alumne hauria de pagar però encara no ho ha fet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lumnes actius</text:span></text:p>
          </table:table-cell>
          <table:table-cell table:style-name="Tabla1.A1" office:value-type="string">
            <text:p text:style-name="Table_20_Contents">Alumnes donats d'alta al sistema</text:p>
          </table:table-cell>
        </table:table-row>
      </table:table>
      <text:h text:style-name="P44" text:outline-level="3">Filtrar per classe</text:h>
      <text:p text:style-name="Text_20_body"><text:span text:style-name="T6">A la part superior hi ha un desplegable </text:span><text:span text:style-name="Strong_20_Emphasis"><text:span text:style-name="T6">«Filtra per classe»</text:span></text:span><text:span text:style-name="T6">. Si el seleccioneu, les estadístiques es calculen només per a aquella classe. Útil si sou tutor/a i voleu veure la situació del vostre grup.</text:span></text:p>
      <text:h text:style-name="P44" text:outline-level="3">Últims préstecs registrats</text:h>
      <text:p text:style-name="P8">A la part inferior esquerra veureu els 8 préstecs més recents: qui va agafar el llibre, quin codi té i en quin estat es troba (actiu, retornat o perdut).</text:p>
      <text:p text:style-name="P26"><text:span text:style-name="Strong_20_Emphasis"><text:span text:style-name="T5">💡 </text:span></text:span><text:span text:style-name="Strong_20_Emphasis"><text:span text:style-name="T2">Accions ràpides:</text:span></text:span><text:span text:style-name="T2"> a la dreta hi ha botons per anar directament a les seccions més habituals: veure classes, llista de préstecs i inventari d'exemplars.</text:span></text:p>
      <text:h text:style-name="P2" text:outline-level="2">3. Navegació: la barra lateral</text:h>
      <text:p text:style-name="P8">A l'esquerra de la pantalla hi ha la barra de navegació (menú). Des d'aquí accediu a totes les seccions. Està dividida en grups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Heading">Grup</text:p>
          </table:table-cell>
          <table:table-cell table:style-name="Tabla2.A1" office:value-type="string">
            <text:p text:style-name="Table_20_Heading">Enllaços</text:p>
          </table:table-cell>
          <table:table-cell table:style-name="Tabla2.A1" office:value-type="string">
            <text:p text:style-name="Table_20_Heading">Per a qui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rincipal</text:span></text:p>
          </table:table-cell>
          <table:table-cell table:style-name="Tabla2.A1" office:value-type="string">
            <text:p text:style-name="Table_20_Contents">Inici, Classes</text:p>
          </table:table-cell>
          <table:table-cell table:style-name="Tabla2.A1" office:value-type="string">
            <text:p text:style-name="Table_20_Contents">Tot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ventari</text:span></text:p>
          </table:table-cell>
          <table:table-cell table:style-name="Tabla2.A1" office:value-type="string">
            <text:p text:style-name="Table_20_Contents">Matèries, Llibres, Exemplars</text:p>
          </table:table-cell>
          <table:table-cell table:style-name="Tabla2.A1" office:value-type="string">
            <text:p text:style-name="Table_20_Contents">Tot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réstecs</text:span></text:p>
          </table:table-cell>
          <table:table-cell table:style-name="Tabla2.A1" office:value-type="string">
            <text:p text:style-name="Table_20_Contents">Llista de préstecs, Incidències</text:p>
          </table:table-cell>
          <table:table-cell table:style-name="Tabla2.A1" office:value-type="string">
            <text:p text:style-name="Table_20_Contents">Tot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dministració</text:span></text:p>
          </table:table-cell>
          <table:table-cell table:style-name="Tabla2.A1" office:value-type="string">
            <text:p text:style-name="Table_20_Contents">Usuaris, Alumnes, Contrasenyes CSV, Importar dades</text:p>
          </table:table-cell>
          <table:table-cell table:style-name="Tabla2.A1" office:value-type="string">
            <text:p text:style-name="Table_20_Contents">Només administrador</text:p>
          </table:table-cell>
        </table:table-row>
      </table:table>
      <text:p text:style-name="Text_20_body"><text:span text:style-name="T6">A la part inferior de la barra apareix el vostre nom, el vostre rol (</text:span><text:span text:style-name="Emphasis"><text:span text:style-name="T6">Administrador</text:span></text:span><text:span text:style-name="T6"> o </text:span><text:span text:style-name="Emphasis"><text:span text:style-name="T6">Professor/a</text:span></text:span><text:span text:style-name="T6">) i l'enllaç per tancar la sessió.</text:span></text:p>
      <text:h text:style-name="P2" text:outline-level="2">4. Classes i alumnes</text:h>
      <text:h text:style-name="P44" text:outline-level="3">4.1 Veure la llista d'alumnes per classe</text:h>
      <text:list xml:id="list1857205158" text:style-name="L4">
        <text:list-item>
          <text:p text:style-name="P29"><text:span text:style-name="T6">Feu clic a </text:span><text:span text:style-name="Strong_20_Emphasis"><text:span text:style-name="T6">«Classes»</text:span></text:span><text:span text:style-name="T6"> o a </text:span><text:span text:style-name="Strong_20_Emphasis"><text:span text:style-name="T6">«Alumnes»</text:span></text:span><text:span text:style-name="T6"> al menú lateral. </text:span></text:p>
        </text:list-item>
        <text:list-item>
          <text:p text:style-name="P10">Al panell esquerre veureu la llista de classes. Feu clic a la que us interessa. </text:p>
        </text:list-item>
        <text:list-item>
          <text:p text:style-name="P11">Al panell dret apareixeran les targetes de tots els alumnes d'aquella classe. </text:p>
        </text:list-item>
      </text:list>
      <text:p text:style-name="P8">Cada targeta d'alumne mostra:</text:p>
      <text:list xml:id="list2995685300" text:style-name="L5">
        <text:list-item>
          <text:p text:style-name="P12">Nom i cognoms </text:p>
        </text:list-item>
        <text:list-item>
          <text:p text:style-name="P12">Correu electrònic de la família </text:p>
        </text:list-item>
        <text:list-item>
          <text:p text:style-name="P12">Nombre de llibres actuals en préstec (badge blau) </text:p>
        </text:list-item>
        <text:list-item>
          <text:p text:style-name="P30"><text:span text:style-name="T6">Si té pagaments pendents, un badge </text:span><text:span text:style-name="Strong_20_Emphasis"><text:span text:style-name="T6">vermell</text:span></text:span><text:span text:style-name="T6"> d'avís </text:span></text:p>
        </text:list-item>
      </text:list>
      <text:p text:style-name="P26"><text:span text:style-name="Strong_20_Emphasis"><text:span text:style-name="T5">💡 </text:span></text:span><text:span text:style-name="Strong_20_Emphasis"><text:span text:style-name="T2">Colors de la targeta:</text:span></text:span><text:span text:style-name="T2"><text:line-break/>— Barra vermella esquerra → té pagaments pendents<text:line-break/>— Barra blava → té llibres en préstec<text:line-break/>— Barra grisa → sense llibres assignats </text:span></text:p>
      <text:p text:style-name="Text_20_body"><text:span text:style-name="T6">Des de cada targeta podeu accedir directament als </text:span><text:span text:style-name="Strong_20_Emphasis"><text:span text:style-name="T6">préstecs</text:span></text:span><text:span text:style-name="T6"> de l'alumne (botó blau) o a la seva </text:span><text:span text:style-name="Strong_20_Emphasis"><text:span text:style-name="T6">fitxa completa</text:span></text:span><text:span text:style-name="T6"> (icona de persona).</text:span></text:p>
      <text:h text:style-name="P44" text:outline-level="3">4.2 Fitxa d'alumne</text:h>
      <text:p text:style-name="P8">La fitxa d'alumne és el lloc central on veureu tota la informació d'un alumne concret. Hi trobareu:</text:p>
      <text:list xml:id="list2153514450" text:style-name="L6">
        <text:list-item>
          <text:p text:style-name="P32"><text:span text:style-name="Strong_20_Emphasis"><text:span text:style-name="T6">Dades personals:</text:span></text:span><text:span text:style-name="T6"> classe, tutor/a, correu de la família </text:span></text:p>
        </text:list-item>
        <text:list-item>
          <text:p text:style-name="P32"><text:span text:style-name="Strong_20_Emphasis"><text:span text:style-name="T6">Botons d'acció:</text:span></text:span><text:span text:style-name="T6"> assignar lot, devolució, incidència, historial… </text:span></text:p>
        </text:list-item>
        <text:list-item>
          <text:p text:style-name="P32"><text:span text:style-name="Strong_20_Emphasis"><text:span text:style-name="T6">Taula de préstecs:</text:span></text:span><text:span text:style-name="T6"> tots els llibres que ha tingut, amb dates i estat </text:span></text:p>
        </text:list-item>
        <text:list-item>
          <text:p text:style-name="P31"><text:span text:style-name="Strong_20_Emphasis"><text:span text:style-name="T6">Taula d'incidències:</text:span></text:span><text:span text:style-name="T6"> incidents registrats i si ha pagat o no </text:span></text:p>
        </text:list-item>
      </text:list>
      <text:h text:style-name="P2" text:outline-level="2">5. Préstecs</text:h>
      <text:h text:style-name="P44" text:outline-level="3">5.1 Assignar un lot de llibres (inici de curs)</text:h>
      <text:p text:style-name="P8">Quan comença el curs cal assignar a cada alumne el seu lot de llibres (les assignatures comunes). Feu-ho alumne per alumne:</text:p>
      <text:list xml:id="list827473923" text:style-name="L7">
        <text:list-item>
          <text:p text:style-name="P33"><text:span text:style-name="T6">Aneu a </text:span><text:span text:style-name="Strong_20_Emphasis"><text:span text:style-name="T6">Alumnes</text:span></text:span><text:span text:style-name="T6"> → seleccioneu la classe → feu clic a </text:span><text:span text:style-name="T8">Préstecs</text:span><text:span text:style-name="T6"> de l'alumne. </text:span></text:p>
        </text:list-item>
        <text:list-item>
          <text:p text:style-name="P13">Si l'alumne no té lot assignat, veureu el botó <text:span text:style-name="T7">Assignar lot</text:span>. Feu-hi clic. </text:p>
        </text:list-item>
        <text:list-item>
          <text:p text:style-name="P13">Apareixerà una llista de totes les assignatures comunes del curs. Per cada una, teniu un desplegable per triar quin exemplar concret li doneu. </text:p>
        </text:list-item>
        <text:list-item>
          <text:p text:style-name="P33"><text:span text:style-name="T6">Si no voleu assignar cap exemplar d'una assignatura (p.ex. perquè no n'hi ha de disponibles), deixeu l'opció </text:span><text:span text:style-name="Emphasis"><text:span text:style-name="T6">«— No assignar —»</text:span></text:span><text:span text:style-name="T6">. </text:span></text:p>
        </text:list-item>
        <text:list-item>
          <text:p text:style-name="P14">Feu clic a <text:span text:style-name="T7">Crear lot i assignar</text:span>. </text:p>
        </text:list-item>
      </text:list>
      <text:p text:style-name="P26"><text:span text:style-name="Strong_20_Emphasis"><text:span text:style-name="T10">✅ </text:span></text:span><text:span text:style-name="Strong_20_Emphasis"><text:span text:style-name="T4">Resultat:</text:span></text:span><text:span text:style-name="T4"> el sistema crea el lot, registra tots els préstecs i genera automàticament un </text:span><text:span text:style-name="Strong_20_Emphasis"><text:span text:style-name="T4">albarà en PDF</text:span></text:span><text:span text:style-name="T4">. Si l'alumne té correu de família configurat, l'albarà s'envia per correu.</text:span></text:p>
      <text:p text:style-name="P26"><text:span text:style-name="Strong_20_Emphasis"><text:span text:style-name="T5">💡 </text:span></text:span><text:span text:style-name="Strong_20_Emphasis"><text:span text:style-name="T2">Codi del lot:</text:span></text:span><text:span text:style-name="T2"> cada lot rep un codi únic com </text:span><text:span text:style-name="T1">LOT-1ASIX-001</text:span><text:span text:style-name="T2">. Els exemplars individuals també reben un codi com </text:span><text:span text:style-name="T1">LOT-1ASIX-001-SI-001</text:span><text:span text:style-name="T2">.</text:span></text:p>
      <text:h text:style-name="P44" text:outline-level="3">5.2 Afegir un llibre d'optativa</text:h>
      <text:p text:style-name="P8">Per a les assignatures optatives, cada llibre s'assigna individualment (no formen part del lot):</text:p>
      <text:list xml:id="list1914713518" text:style-name="L8">
        <text:list-item>
          <text:p text:style-name="P15">Aneu a la fitxa de préstecs de l'alumne. </text:p>
        </text:list-item>
        <text:list-item>
          <text:p text:style-name="P15">Feu clic a Afegir llibre d'optativa. </text:p>
        </text:list-item>
        <text:list-item>
          <text:p text:style-name="P15">Trieu l'exemplar disponible de la llista desplegable. </text:p>
        </text:list-item>
        <text:list-item>
          <text:p text:style-name="P16">Feu clic a <text:span text:style-name="T7">Assignar optativa</text:span>. </text:p>
        </text:list-item>
      </text:list>
      <text:h text:style-name="P44" text:outline-level="3">5.3 Registrar una devolució</text:h>
      <text:p text:style-name="P8">Quan un alumne torna els llibres (final de curs o parcialment):</text:p>
      <text:list xml:id="list3638538623" text:style-name="L9">
        <text:list-item>
          <text:p text:style-name="P17">Aneu a la fitxa de préstecs de l'alumne. </text:p>
        </text:list-item>
        <text:list-item>
          <text:p text:style-name="P17">Feu clic a Registrar devolució. </text:p>
        </text:list-item>
        <text:list-item>
          <text:p text:style-name="P34"><text:span text:style-name="T6">Veureu una taula amb tots els exemplars que té en préstec. Per cada un trieu:<text:line-break/>— </text:span><text:span text:style-name="Strong_20_Emphasis"><text:span text:style-name="T6">«Retornat»</text:span></text:span><text:span text:style-name="T6">: el llibre torna en bon estat, queda lliure per a un altre alumne.<text:line-break/>— </text:span><text:span text:style-name="Strong_20_Emphasis"><text:span text:style-name="T6">«Perdut»</text:span></text:span><text:span text:style-name="T6">: el llibre no torna o ha desaparegut (es registra automàticament una incidència).<text:line-break/>— </text:span><text:span text:style-name="Strong_20_Emphasis"><text:span text:style-name="T6">«— Deixar actiu —»</text:span></text:span><text:span text:style-name="T6">: l'alumne encara no el torna (per si feu una devolució parcial). </text:span></text:p>
        </text:list-item>
        <text:list-item>
          <text:p text:style-name="P18">Feu clic a Confirmar devolució. </text:p>
        </text:list-item>
      </text:list>
      <text:p text:style-name="P26"><text:span text:style-name="Strong_20_Emphasis"><text:span text:style-name="T10">✅ </text:span></text:span><text:span text:style-name="Strong_20_Emphasis"><text:span text:style-name="T4">Resultat:</text:span></text:span><text:span text:style-name="T4"> els exemplars retornats queden disponibles per a nous préstecs i es genera un albarà de devolució.</text:span></text:p>
      <text:h text:style-name="P44" text:outline-level="3">5.4 Registrar una incidència</text:h>
      <text:p text:style-name="P8">Si un alumne ha malmès o extraviat un llibre, registreu-ho com a incidència:</text:p>
      <text:list xml:id="list1318375552" text:style-name="L10">
        <text:list-item>
          <text:p text:style-name="P19">Aneu a la fitxa de préstecs de l'alumne. </text:p>
        </text:list-item>
        <text:list-item>
          <text:p text:style-name="P19">Feu clic a Registrar incidència. </text:p>
        </text:list-item>
        <text:list-item>
          <text:p text:style-name="P19">Trieu quin exemplar té el problema (desplegable). </text:p>
        </text:list-item>
        <text:list-item>
          <text:p text:style-name="P35"><text:span text:style-name="T6">Trieu el tipus d'incidència:<text:line-break/>— </text:span><text:span text:style-name="Strong_20_Emphasis"><text:span text:style-name="T6">Pèrdua</text:span></text:span><text:span text:style-name="T6">: el llibre s'ha perdut definitivament.<text:line-break/>— </text:span><text:span text:style-name="Strong_20_Emphasis"><text:span text:style-name="T6">Deteriorament greu</text:span></text:span><text:span text:style-name="T6">: el llibre s'ha fet malbé.<text:line-break/>— </text:span><text:span text:style-name="Strong_20_Emphasis"><text:span text:style-name="T6">Extraviu</text:span></text:span><text:span text:style-name="T6">: no apareix de moment.<text:line-break/>— </text:span><text:span text:style-name="Strong_20_Emphasis"><text:span text:style-name="T6">Altre</text:span></text:span><text:span text:style-name="T6">: qualsevol altra situació. </text:span></text:p>
        </text:list-item>
        <text:list-item>
          <text:p text:style-name="P19">Escriviu una breu descripció del que ha passat. </text:p>
        </text:list-item>
        <text:list-item>
          <text:p text:style-name="P35"><text:span text:style-name="T6">Si l'alumne ha de pagar, marqueu la casella </text:span><text:span text:style-name="Strong_20_Emphasis"><text:span text:style-name="T6">«Ha de pagar»</text:span></text:span><text:span text:style-name="T6"> i introduïu l'import. </text:span></text:p>
        </text:list-item>
        <text:list-item>
          <text:p text:style-name="P20">Feu clic a Registrar incidència. </text:p>
        </text:list-item>
      </text:list>
      <text:p text:style-name="P26"><text:span text:style-name="Strong_20_Emphasis"><text:span text:style-name="T9">⚠️ </text:span></text:span><text:span text:style-name="Strong_20_Emphasis"><text:span text:style-name="T3">Important:</text:span></text:span><text:span text:style-name="T3"> si marqueu </text:span><text:span text:style-name="Emphasis"><text:span text:style-name="T3">Pèrdua</text:span></text:span><text:span text:style-name="T3"> o </text:span><text:span text:style-name="Emphasis"><text:span text:style-name="T3">Extraviu</text:span></text:span><text:span text:style-name="T3">, l'exemplar quedarà marcat com a perdut i ja no es podrà prestar a ningú altre fins que es recuperi o se'n doni d'alta un de nou.</text:span></text:p>
      <text:h text:style-name="P44" text:outline-level="3">5.5 Historial d'un alumne</text:h>
      <text:p text:style-name="P8">Per veure tots els moviments d'un alumne al llarg del temps:</text:p>
      <text:list xml:id="list3314614627" text:style-name="L11">
        <text:list-item>
          <text:p text:style-name="P21">Aneu a la fitxa de préstecs de l'alumne. </text:p>
        </text:list-item>
        <text:list-item>
          <text:p text:style-name="P21">Feu clic a Historial. </text:p>
        </text:list-item>
        <text:list-item>
          <text:p text:style-name="P22">Veureu una taula cronològica de tots els esdeveniments: préstecs, devolucions, incidències… </text:p>
        </text:list-item>
      </text:list>
      <text:h text:style-name="P2" text:outline-level="2">6. Incidències</text:h>
      <text:h text:style-name="P44" text:outline-level="3">Veure totes les incidències</text:h>
      <text:p text:style-name="Text_20_body"><text:span text:style-name="T6">Al menú lateral, sota </text:span><text:span text:style-name="Strong_20_Emphasis"><text:span text:style-name="T6">«Préstecs»</text:span></text:span><text:span text:style-name="T6">, feu clic a </text:span><text:span text:style-name="Strong_20_Emphasis"><text:span text:style-name="T6">«Incidències»</text:span></text:span><text:span text:style-name="T6">. Veureu una taula amb totes les incidències registrades al centre, ordenades de la més recent a la més antiga.</text:span></text:p>
      <text:p text:style-name="P8">La taula mostra per cada incidència:</text:p>
      <text:list xml:id="list417146619" text:style-name="L12">
        <text:list-item>
          <text:p text:style-name="P23">Data, alumne/a, classe, codi de l'exemplar i títol del llibre </text:p>
        </text:list-item>
        <text:list-item>
          <text:p text:style-name="P23">Tipus d'incidència i descripció </text:p>
        </text:list-item>
        <text:list-item>
          <text:p text:style-name="P23">Si ha de pagar i quin import </text:p>
        </text:list-item>
        <text:list-item>
          <text:p text:style-name="P36"><text:span text:style-name="T6">Estat del pagament: </text:span><text:span text:style-name="Strong_20_Emphasis"><text:span text:style-name="T6">Pendent</text:span></text:span><text:span text:style-name="T6"> (taronja) o </text:span><text:span text:style-name="Strong_20_Emphasis"><text:span text:style-name="T6">Pagat</text:span></text:span><text:span text:style-name="T6"> (verd) </text:span></text:p>
        </text:list-item>
      </text:list>
      <text:h text:style-name="P44" text:outline-level="3"><text:soft-page-break/>Marcar una incidència com a pagada</text:h>
      <text:list xml:id="list1103331436" text:style-name="L13">
        <text:list-item>
          <text:p text:style-name="P24">Localitzeu la incidència a la taula. </text:p>
        </text:list-item>
        <text:list-item>
          <text:p text:style-name="P24">Feu clic al botó Pagat que apareix a la columna d'accions. </text:p>
        </text:list-item>
        <text:list-item>
          <text:p text:style-name="P25">Confirmeu a la finestra que apareix. </text:p>
        </text:list-item>
      </text:list>
      <text:p text:style-name="P26"><text:span text:style-name="Strong_20_Emphasis"><text:span text:style-name="T10">✅ </text:span></text:span><text:span text:style-name="Strong_20_Emphasis"><text:span text:style-name="T4">Resultat:</text:span></text:span><text:span text:style-name="T4"> la incidència queda marcada com a pagada amb la data d'avui.</text:span></text:p>
      <text:h text:style-name="P2" text:outline-level="2">7. Inventari: matèries, llibres i exemplars</text:h>
      <text:h text:style-name="P44" text:outline-level="3">7.1 Matèries</text:h>
      <text:p text:style-name="Text_20_body"><text:span text:style-name="T6">Les matèries representen les assignatures del centre. Aneu a </text:span><text:span text:style-name="Strong_20_Emphasis"><text:span text:style-name="T6">«Matèries»</text:span></text:span><text:span text:style-name="T6"> al menú lateral.</text:span></text:p>
      <text:p text:style-name="P8">Cada matèria té:</text:p>
      <text:list xml:id="list4248387709" text:style-name="L14">
        <text:list-item>
          <text:p text:style-name="P38"><text:span text:style-name="Strong_20_Emphasis"><text:span text:style-name="T6">Nom:</text:span></text:span><text:span text:style-name="T6"> nom complet de l'assignatura </text:span></text:p>
        </text:list-item>
        <text:list-item>
          <text:p text:style-name="P38"><text:span text:style-name="Strong_20_Emphasis"><text:span text:style-name="T6">Codi:</text:span></text:span><text:span text:style-name="T6"> abreviatura (p.ex. </text:span><text:span text:style-name="T1">SI</text:span><text:span text:style-name="T6"> per a Sistemes Informàtics) </text:span></text:p>
        </text:list-item>
        <text:list-item>
          <text:p text:style-name="P38"><text:span text:style-name="Strong_20_Emphasis"><text:span text:style-name="T6">Tipus:</text:span></text:span><text:span text:style-name="T6"> </text:span><text:span text:style-name="Emphasis"><text:span text:style-name="T6">Comuna</text:span></text:span><text:span text:style-name="T6"> (tots els alumnes del curs la cursen) o </text:span><text:span text:style-name="Emphasis"><text:span text:style-name="T6">Optativa</text:span></text:span><text:span text:style-name="T6"> </text:span></text:p>
        </text:list-item>
        <text:list-item>
          <text:p text:style-name="P37"><text:span text:style-name="Strong_20_Emphasis"><text:span text:style-name="T6">Llibres:</text:span></text:span><text:span text:style-name="T6"> nombre de títols associats a aquesta assignatura </text:span></text:p>
        </text:list-item>
      </text:list>
      <text:p text:style-name="P26"><text:span text:style-name="Strong_20_Emphasis"><text:span text:style-name="T5">💡 </text:span></text:span><text:span text:style-name="Strong_20_Emphasis"><text:span text:style-name="T2">Nota per a l'administrador:</text:span></text:span><text:span text:style-name="T2"> el formulari per crear una nova matèria apareix a la dreta de la pantalla. Podeu editar o eliminar matèries amb els botons de cada fila (la icona del llapis i la de l'escombraries). Només es pot eliminar una matèria si no té cap llibre associat.</text:span></text:p>
      <text:h text:style-name="P44" text:outline-level="3">7.2 Llibres</text:h>
      <text:p text:style-name="Text_20_body"><text:span text:style-name="T6">Els llibres representen els </text:span><text:span text:style-name="Emphasis"><text:span text:style-name="T6">títols</text:span></text:span><text:span text:style-name="T6"> (el catàleg). Aneu a </text:span><text:span text:style-name="Strong_20_Emphasis"><text:span text:style-name="T6">«Llibres»</text:span></text:span><text:span text:style-name="T6"> al menú lateral.</text:span></text:p>
      <text:p text:style-name="P8">Per cada llibre veureu el títol, la matèria, el curs, l'ISBN, i el nombre d'exemplars físics (totals i disponibles). Fent clic al número d'exemplars accediu directament a la llista de còpies físiques d'aquell títol.</text:p>
      <text:p text:style-name="P8">Per afegir un llibre nou (admin): feu clic a <text:span text:style-name="T7">Nou llibre</text:span> a dalt a la dreta, ompliu el formulari i guardeu.</text:p>
      <text:h text:style-name="P44" text:outline-level="3">7.3 Exemplars</text:h>
      <text:p text:style-name="Text_20_body"><text:span text:style-name="T6">Els exemplars són les còpies físiques dels llibres (els que es presten de veritat). Aneu a </text:span><text:span text:style-name="Strong_20_Emphasis"><text:span text:style-name="T6">«Exemplars»</text:span></text:span><text:span text:style-name="T6"> al menú lateral.</text:span></text:p>
      <text:p text:style-name="P8">Podeu filtrar per:</text:p>
      <text:list xml:id="list123059781" text:style-name="L15">
        <text:list-item>
          <text:p text:style-name="P40"><text:span text:style-name="Strong_20_Emphasis"><text:span text:style-name="T6">Llibre</text:span></text:span><text:span text:style-name="T6">: per veure totes les còpies d'un títol concret </text:span></text:p>
        </text:list-item>
        <text:list-item>
          <text:p text:style-name="P40"><text:span text:style-name="Strong_20_Emphasis"><text:span text:style-name="T6">Estat</text:span></text:span><text:span text:style-name="T6">: Nou, Bo, Deteriorat, Perdut </text:span></text:p>
        </text:list-item>
        <text:list-item>
          <text:p text:style-name="P39"><text:span text:style-name="Strong_20_Emphasis"><text:span text:style-name="T6">Disponibilitat</text:span></text:span><text:span text:style-name="T6">: si estan disponibles per prestar o no </text:span></text:p>
        </text:list-item>
      </text:list>
      <text:p text:style-name="P8">Cada fila mostra el codi únic de l'exemplar, el seu estat, si està disponible, i notes sobre desperfectes. Podeu editar l'estat d'un exemplar fent clic a la icona del llapis.</text:p>
      <text:p text:style-name="P26"><text:span text:style-name="Strong_20_Emphasis"><text:span text:style-name="T5">💡 </text:span></text:span><text:span text:style-name="Strong_20_Emphasis"><text:span text:style-name="T2">Crear exemplars nous (admin):</text:span></text:span><text:span text:style-name="T2"> filtreu per un llibre concret, feu clic a </text:span><text:span text:style-name="T8">Nou exemplar</text:span><text:span text:style-name="T2">, trieu l'estat inicial i la quantitat a crear. El sistema genera automàticament els codis.</text:span></text:p>
      <text:h text:style-name="P2" text:outline-level="2">8. Administració</text:h>
      <text:p text:style-name="Text_20_body"><text:span text:style-name="T6">Aquesta secció és visible i accessible únicament per als usuaris amb rol d'</text:span><text:span text:style-name="Strong_20_Emphasis"><text:span text:style-name="T6">Administrador</text:span></text:span><text:span text:style-name="T6">.</text:span></text:p>
      <text:h text:style-name="P44" text:outline-level="3">Gestió d'usuaris</text:h>
      <text:p text:style-name="Text_20_body"><text:span text:style-name="T6">Aneu a </text:span><text:span text:style-name="Strong_20_Emphasis"><text:span text:style-name="T6">«Usuaris»</text:span></text:span><text:span text:style-name="T6"> per veure, crear i gestionar els comptes del professorat. Podeu crear un nou usuari introduint nom, cognoms, correu electrònic, rol (admin o professor) i contrasenya inicial.</text:span></text:p>
      <text:h text:style-name="P44" text:outline-level="3">Gestió d'alumnes (alta individual)</text:h>
      <text:p text:style-name="Text_20_body"><text:span text:style-name="T6">Des de </text:span><text:span text:style-name="Strong_20_Emphasis"><text:span text:style-name="T6">«Alumnes»</text:span></text:span><text:span text:style-name="T6"> podeu donar d'alta un alumne manualment, indicant nom, cognoms, classe, NIA, i correu de la família.</text:span></text:p>
      <text:h text:style-name="P44" text:outline-level="3">Importar dades massius</text:h>
      <text:p text:style-name="Text_20_body"><text:span text:style-name="T6">Per importar dades en bloc (al principi de curs) el sistema accepta fitxers </text:span><text:span text:style-name="Strong_20_Emphasis"><text:span text:style-name="T6">XML</text:span></text:span><text:span text:style-name="T6">. Cal fer-ho en aquest ordre:</text:span></text:p>
      <text:list xml:id="list3525324450" text:style-name="L16">
        <text:list-item>
          <text:p text:style-name="P42"><text:span text:style-name="Strong_20_Emphasis"><text:span text:style-name="T6">Matèries</text:span></text:span><text:span text:style-name="T6"> — fitxer </text:span><text:span text:style-name="T1">materies.xml</text:span><text:span text:style-name="T6"> </text:span></text:p>
        </text:list-item>
        <text:list-item>
          <text:p text:style-name="P42"><text:span text:style-name="Strong_20_Emphasis"><text:span text:style-name="T6">Classes</text:span></text:span><text:span text:style-name="T6"> — fitxer </text:span><text:span text:style-name="T1">cursos.xml</text:span><text:span text:style-name="T6"> </text:span></text:p>
        </text:list-item>
        <text:list-item>
          <text:p text:style-name="P42"><text:span text:style-name="Strong_20_Emphasis"><text:span text:style-name="T6">Professorat</text:span></text:span><text:span text:style-name="T6"> — fitxer </text:span><text:span text:style-name="T1">professors.xml</text:span><text:span text:style-name="T6"> </text:span></text:p>
        </text:list-item>
        <text:list-item>
          <text:p text:style-name="P42"><text:span text:style-name="Strong_20_Emphasis"><text:span text:style-name="T6">Alumnes</text:span></text:span><text:span text:style-name="T6"> — fitxer </text:span><text:span text:style-name="T1">alumnes.xml</text:span><text:span text:style-name="T6"> </text:span></text:p>
        </text:list-item>
        <text:list-item>
          <text:p text:style-name="P41"><text:span text:style-name="Strong_20_Emphasis"><text:span text:style-name="T6">Llibres</text:span></text:span><text:span text:style-name="T6"> — fitxer </text:span><text:span text:style-name="T1">llibres.xml</text:span><text:span text:style-name="T6"> </text:span></text:p>
        </text:list-item>
      </text:list>
      <text:p text:style-name="P26"><text:span text:style-name="Strong_20_Emphasis"><text:span text:style-name="T9">⚠️ </text:span></text:span><text:span text:style-name="Strong_20_Emphasis"><text:span text:style-name="T3">Important:</text:span></text:span><text:span text:style-name="T3"> respecteu l'ordre. No podeu importar alumnes si les classes no existeixen, ni llibres si les matèries no estan creades.</text:span></text:p>
      <text:h text:style-name="P44" text:outline-level="3">Descarregar contrasenyes CSV</text:h>
      <text:p text:style-name="Text_20_body"><text:span text:style-name="T6">Un cop importat el professorat, podeu descarregar un fitxer CSV amb les contrasenyes inicials generades automàticament. Aneu a </text:span><text:span text:style-name="Strong_20_Emphasis"><text:span text:style-name="T6">«Contrasenyes CSV»</text:span></text:span><text:span text:style-name="T6">. Entregeu aquest fitxer als professors en mà i demaneu-los que canviïn la contrasenya.</text:span></text:p>
      <text:h text:style-name="P2" text:outline-level="2">9. Preguntes freqüents</text:h>
      <text:h text:style-name="P44" text:outline-level="3">«No veig la secció d'Administració al menú»</text:h>
      <text:p text:style-name="P8">Aquesta secció és exclusiva del rol d'administrador. Si necessiteu accés, contacteu amb el coordinador del centre perquè us canviï el rol.</text:p>
      <text:h text:style-name="P44" text:outline-level="3">«L'alumne ja té lot assignat però no apareix el botó»</text:h>
      <text:p text:style-name="P8">Si l'alumne ja té lot, el botó «Assignar lot» desapareix per evitar duplicats. Si cal corregir alguna cosa, contacteu amb l'administrador.</text:p>
      <text:h text:style-name="P44" text:outline-level="3">«No hi ha exemplars disponibles per assignar»</text:h>
      <text:p text:style-name="Text_20_body"><text:span text:style-name="T6">Tots els exemplars d'aquella assignatura estan prestats o marcats com a perduts. Cal que l'administrador creï nous exemplars des de la secció </text:span><text:span text:style-name="Strong_20_Emphasis"><text:span text:style-name="T6">«Exemplars»</text:span></text:span><text:span text:style-name="T6">.</text:span></text:p>
      <text:h text:style-name="P44" text:outline-level="3">«El correu de l'albarà no ha arribat a la família»</text:h>
      <text:p text:style-name="P8">El correu és opcional i depèn de la configuració del servidor de correu. Si no arriba, podeu imprimir l'albarà directament des de la secció d'albarans o reenviar-lo manualment des de la fitxa de l'alumne.</text:p>
      <text:h text:style-name="P44" text:outline-level="3">«He registrat una devolució per error»</text:h>
      <text:p text:style-name="P8">Contacteu amb l'administrador. Les devolucions no es poden desfer directament des de la interfície per evitar manipulacions accidentals.</text:p>
      <text:h text:style-name="P44" text:outline-level="3">«La pantalla es veu malament en mòbil»</text:h>
      <text:p text:style-name="P8">L'aplicació és accessible des del mòbil, però està optimitzada per a ordinador o tauleta. Per a un ús còmode es recomana una pantalla d'almenys 10 polzades.</text:p>
      <text:p text:style-name="Text_20_body">Banc de Llibres — Manual d'usuari — Curs 2025/2026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s" fo:country="E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5%"/>
      <style:text-properties fo:color="#1a1a2e" loext:opacity="100%" style:font-name="Liberation Sans1" fo:font-family="'Liberation Sans', Arial, sans-serif" fo:font-size="11pt" style:font-name-asian="Liberation Sans1" style:font-family-asian="'Liberation Sans', Arial, sans-serif" style:font-size-asian="11pt" style:font-name-complex="Liberation Sans1" style:font-family-complex="'Liberation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65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ítulo_20_2.seccio" style:display-name="Título 2.seccio" style:family="paragraph" style:parent-style-name="Heading_20_2">
      <style:paragraph-properties fo:margin-left="0.847cm" fo:margin-right="0.847cm" fo:margin-top="0.847cm" fo:margin-bottom="0.476cm" style:contextual-spacing="false" fo:text-indent="0cm" style:auto-text-indent="false" fo:padding="0cm" fo:border="none" fo:keep-with-next="always"/>
      <style:text-properties fo:color="#ffffff" loext:opacity="100%" fo:font-size="17pt" style:font-size-asian="17pt" style:font-size-complex="1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ítulo_20_3.subseccio" style:display-name="Título 3.subseccio" style:family="paragraph" style:parent-style-name="Heading_20_3">
      <style:paragraph-properties fo:margin-left="0.635cm" fo:margin-right="0.635cm" fo:margin-top="0.635cm" fo:margin-bottom="0.265cm" style:contextual-spacing="false" fo:text-indent="0cm" style:auto-text-indent="false" fo:padding-left="0.318cm" fo:padding-right="0cm" fo:padding-top="0cm" fo:padding-bottom="0cm" fo:border-left="3.74pt solid #90caf9" fo:border-right="none" fo:border-top="none" fo:border-bottom="none" fo:keep-with-next="always"/>
      <style:text-properties fo:color="#1a237e" loext:opacity="100%" fo:font-size="13pt" style:font-size-asian="13pt" style:font-size-complex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image-count="0" meta:object-count="0" meta:page-count="2" meta:paragraph-count="193" meta:word-count="1981" meta:character-count="12002" meta:non-whitespace-character-count="10190"/>
    <meta:generator>LibreOffice/7.3.7.2$Linux_X86_64 LibreOffice_project/30$Build-2</meta:generator>
    <meta:user-defined meta:name=""/>
  </office:meta>
</office:document-meta>
</file>